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B000001C7EFB09C8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4.039cm" fo:margin-left="0.009cm" fo:margin-top="0cm" fo:margin-bottom="0cm" table:align="left" style:writing-mode="page"/>
    </style:style>
    <style:style style:name="Table1.A" style:family="table-column">
      <style:table-column-properties style:column-width="2.866cm"/>
    </style:style>
    <style:style style:name="Table1.B" style:family="table-column">
      <style:table-column-properties style:column-width="3.39cm"/>
    </style:style>
    <style:style style:name="Table1.C" style:family="table-column">
      <style:table-column-properties style:column-width="7.78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26cm" fo:border="0.5pt solid #000000"/>
    </style:style>
    <style:style style:name="P1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Segoe UI Emoji'" style:font-family-generic="swiss" style:font-pitch="variable" style:font-family-complex="'Segoe UI Emoji'" style:font-family-generic-complex="system" style:font-pitch-complex="variabl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Slide 1 — What is Beonedge?</text:span><text:span text:style-name="T1"/></text:p>
      <text:p text:style-name="Standard"><text:span text:style-name="T1">Beonedge Wealth Management</text:span></text:p>
      <text:p text:style-name="Standard">Beonedge is a research-driven wealth management firm focused on helping investors grow their capital through disciplined investing and strategic asset allocation.</text:p>
      <text:p text:style-name="Standard">We allocate client capital across:</text:p>
      <text:p text:style-name="Standard">• <text:span text:style-name="T1">Equity Markets</text:span><text:line-break/>• <text:span text:style-name="T1">Commodities</text:span><text:line-break/>• <text:span text:style-name="T1">Fixed Income Instruments</text:span></text:p>
      <text:p text:style-name="Standard">Our objective is to generate <text:span text:style-name="T1">sustainable long-term returns</text:span> by combining:</text:p>
      <text:p text:style-name="Standard">• Deep fundamental research<text:line-break/>• Risk-managed portfolio construction<text:line-break/>• Strategic asset allocation</text:p>
      <text:p text:style-name="Standard">We aim to help investors grow their hard-earned money <text:span text:style-name="T1">beyond traditional investment options such as bank deposits and passive index returns</text:span>, while maintaining a disciplined approach to risk.</text:p>
      <text:p text:style-name="Standard"><draw:rect text:anchor-type="as-char" style:rel-width="100%" draw:z-index="1" draw:style-name="gr1" draw:text-style-name="P1" svg:width="16.511cm" svg:height="0.054cm"><text:p/></draw:rect></text:p>
      <text:p text:style-name="Standard" loext:marker-style-name="T1"><text:span text:style-name="T1">Slide 2 — Our Aim &amp; Investment Philosophy</text:span><text:span text:style-name="T1"/></text:p>
      <text:p text:style-name="Standard">At Beonedge, our philosophy is built on <text:span text:style-name="T1">two core principles</text:span>.</text:p>
      <text:p text:style-name="Standard" loext:marker-style-name="T1"><text:span text:style-name="T1">1. Consistent Wealth Creation</text:span><text:span text:style-name="T1"/></text:p>
      <text:p text:style-name="Standard">Our long-term goal is to deliver returns that <text:span text:style-name="T1">outperform benchmark indices and traditional savings instruments</text:span> through disciplined investing.</text:p>
      <text:p text:style-name="Standard">Expected long-term target range:</text:p>
      <text:p text:style-name="Standard"><text:span text:style-name="T1">12–15% CAGR over market cycles</text:span></text:p>
      <text:p text:style-name="Standard">This is achieved through:</text:p>
      <text:p text:style-name="Standard">• Strategic asset allocation<text:line-break/>• Fundamental research<text:line-break/><text:soft-page-break/>• Risk management<text:line-break/>• Market cycle awareness</text:p>
      <text:p text:style-name="Standard"><draw:rect text:anchor-type="as-char" style:rel-width="100%" draw:z-index="2" draw:style-name="gr1" draw:text-style-name="P1" svg:width="16.511cm" svg:height="0.054cm"><text:p/></draw:rect></text:p>
      <text:p text:style-name="Standard" loext:marker-style-name="T1"><text:span text:style-name="T1">2. Capital Protection First</text:span><text:span text:style-name="T1"/></text:p>
      <text:p text:style-name="Standard">Preserving client capital during adverse market conditions is equally important as generating returns.</text:p>
      <text:p text:style-name="Standard">Our investment strategy focuses on:</text:p>
      <text:p text:style-name="Standard">• Managing downside risk<text:line-break/>• Reducing volatility during market stress<text:line-break/>• Protecting capital during extreme market conditions</text:p>
      <text:p text:style-name="Standard"><draw:rect text:anchor-type="as-char" style:rel-width="100%" draw:z-index="3" draw:style-name="gr1" draw:text-style-name="P1" svg:width="16.511cm" svg:height="0.054cm"><text:p/></draw:rect></text:p>
      <text:p text:style-name="Standard" loext:marker-style-name="T1"><text:span text:style-name="T1">Slide 3 — Services We Provide</text:span><text:span text:style-name="T1"/></text:p>
      <text:p text:style-name="Standard">Beonedge offers multiple investment options depending on investor requirements.</text:p>
      <text:p text:style-name="Standard" loext:marker-style-name="T1"><text:span text:style-name="T1">1. Systematic Investment Plan (SIP)</text:span><text:span text:style-name="T1"/></text:p>
      <text:p text:style-name="Standard">A disciplined investment approach where investors contribute a fixed amount periodically.</text:p>
      <text:p text:style-name="Standard" loext:marker-style-name="T1"><text:span text:style-name="T1">2. One-Time Investment</text:span><text:span text:style-name="T1"/></text:p>
      <text:p text:style-name="Standard">For investors who want to deploy capital at once and stay invested for the long term.</text:p>
      <text:p text:style-name="Standard" loext:marker-style-name="T1"><text:span text:style-name="T1">3. Portfolio Management Service (PMS)</text:span><text:span text:style-name="T1"/></text:p>
      <text:p text:style-name="Standard">Customized portfolio management for larger investors with performance-linked profit sharing.</text:p>
      <text:p text:style-name="Standard"><draw:rect text:anchor-type="as-char" style:rel-width="100%" draw:z-index="4" draw:style-name="gr1" draw:text-style-name="P1" svg:width="16.511cm" svg:height="0.054cm"><text:p/></draw:rect></text:p>
      <text:p text:style-name="Standard" loext:marker-style-name="T1"><text:span text:style-name="T1">Slide 4 — Modes of Investment</text:span><text:span text:style-name="T1"/></text:p>
      <text:p text:style-name="Standard" loext:marker-style-name="T1"><text:span text:style-name="T1">1. SIP (Systematic Investment Plan)</text:span><text:span text:style-name="T1"/></text:p>
      <text:p text:style-name="Standard"><text:soft-page-break/>• Minimum Investment: <text:span text:style-name="T1">₹500 per month</text:span><text:line-break/>• Minimum Duration: <text:span text:style-name="T1">12 months</text:span></text:p>
      <text:p text:style-name="Standard">Investors choose a fixed amount that will be invested automatically every month on a predetermined date.</text:p>
      <text:p text:style-name="Standard">Example:<text:line-break/><text:span text:style-name="T1">4th of every month</text:span></text:p>
      <text:p text:style-name="Standard">This method promotes <text:span text:style-name="T1">discipline and long-term wealth creation</text:span>.</text:p>
      <text:p text:style-name="Standard"><draw:rect text:anchor-type="as-char" style:rel-width="100%" draw:z-index="5" draw:style-name="gr1" draw:text-style-name="P1" svg:width="16.511cm" svg:height="0.054cm"><text:p/></draw:rect></text:p>
      <text:p text:style-name="Standard" loext:marker-style-name="T1"><text:span text:style-name="T1">2. One-Time Investment</text:span><text:span text:style-name="T1"/></text:p>
      <text:p text:style-name="Standard">• Minimum Investment: <text:span text:style-name="T1">₹10,000</text:span><text:line-break/>• Minimum Holding Period: <text:span text:style-name="T1">12 months</text:span></text:p>
      <text:p text:style-name="Standard">This is suitable for investors who wish to deploy capital in a lump sum and participate in long-term market growth.</text:p>
      <text:p text:style-name="Standard"><draw:rect text:anchor-type="as-char" style:rel-width="100%" draw:z-index="6" draw:style-name="gr1" draw:text-style-name="P1" svg:width="16.511cm" svg:height="0.054cm"><text:p/></draw:rect></text:p>
      <text:p text:style-name="Standard" loext:marker-style-name="T1"><text:span text:style-name="T1">3. Portfolio Management Service (PMS)</text:span><text:span text:style-name="T1"/></text:p>
      <text:p text:style-name="Standard">• Minimum Capital: <text:span text:style-name="T1">₹5,00,000</text:span></text:p>
      <text:p text:style-name="Standard">Our PMS model is <text:span text:style-name="T1">performance based</text:span>.</text:p>
      <text:p text:style-name="Standard">• Profit sharing applies <text:span text:style-name="T1">only after outperforming benchmark returns</text:span><text:line-break/>• If benchmark returns are not beaten → <text:span text:style-name="T1">no commission</text:span></text:p>
      <text:p text:style-name="Standard">This ensures <text:span text:style-name="T1">complete alignment between investor and manager performance</text:span>.</text:p>
      <text:p text:style-name="Standard"><draw:rect text:anchor-type="as-char" style:rel-width="100%" draw:z-index="7" draw:style-name="gr1" draw:text-style-name="P1" svg:width="16.511cm" svg:height="0.054cm"><text:p/></draw:rect></text:p>
      <text:p text:style-name="Standard" loext:marker-style-name="T1"><text:span text:style-name="T1">Slide 5 — Why Choose Beonedge?</text:span><text:span text:style-name="T1"/></text:p>
      <text:p text:style-name="Standard" loext:marker-style-name="T1"><text:span text:style-name="T1">Experienced Market Participation</text:span><text:span text:style-name="T1"/></text:p>
      <text:p text:style-name="Standard">Our team has actively participated in financial markets for <text:span text:style-name="T1">over 5 years</text:span>, navigating multiple market cycles including:</text:p>
      <text:p text:style-name="Standard"><text:soft-page-break/>• COVID-19 market crash<text:line-break/>• Russia-Ukraine geopolitical volatility<text:line-break/>• Bull market phases of 2023–2024<text:line-break/>• Current evolving market conditions</text:p>
      <text:p text:style-name="Standard"><draw:rect text:anchor-type="as-char" style:rel-width="100%" draw:z-index="8" draw:style-name="gr1" draw:text-style-name="P1" svg:width="16.511cm" svg:height="0.054cm"><text:p/></draw:rect></text:p>
      <text:p text:style-name="Standard" loext:marker-style-name="T1"><text:span text:style-name="T1">Strong Performance Track Record</text:span><text:span text:style-name="T1"/></text:p>
      <text:p text:style-name="Standard">We have maintained an <text:span text:style-name="T1">average CAGR of approximately 16% over the last 5 years</text:span> through disciplined investing.</text:p>
      <text:p text:style-name="Standard">A<draw:frame draw:style-name="fr1" draw:name="Picture 2" text:anchor-type="as-char" svg:width="14.503cm" svg:height="11.557cm" draw:z-index="0"><draw:image xlink:href="Pictures/100000000000023B000001C7EFB09C80.jpg" xlink:type="simple" xlink:show="embed" xlink:actuate="onLoad" draw:mime-type="image/jpeg"/></draw:frame></text:p>
      <text:p text:style-name="Standard">A ₹100 investment growing at <text:span text:style-name="T1">16% CAGR</text:span> reaches approximately <text:span text:style-name="T1">₹210 in 5 years</text:span>, compared to around <text:span text:style-name="T1">₹176</text:span> at <text:span text:style-name="T1">12% CAGR benchmark growth</text:span>.</text:p>
      <text:p text:style-name="Standard">This highlights the <text:span text:style-name="T1">power of consistent alpha generation over time</text:span>.</text:p>
      <text:p text:style-name="Standard" loext:marker-style-name="T1"><text:span text:style-name="T1">Research-Driven Approach</text:span><text:span text:style-name="T1"/></text:p>
      <text:p text:style-name="Standard">Our investment strategy is built on:</text:p>
      <text:p text:style-name="Standard"><text:soft-page-break/>• Deep <text:span text:style-name="T1">fundamental research</text:span><text:line-break/>• <text:span text:style-name="T1">Market data analysis</text:span><text:line-break/>• <text:span text:style-name="T1">Statistical and algorithmic models</text:span> developed internally<text:line-break/>• Continuous monitoring of <text:span text:style-name="T1">market trends and macro factors</text:span></text:p>
      <text:p text:style-name="Standard">Since our portfolio focuses primarily on <text:span text:style-name="T1">Indian equities</text:span>, we develop deeper sector expertise and research advantage.</text:p>
      <text:p text:style-name="Standard"><draw:rect text:anchor-type="as-char" style:rel-width="100%" draw:z-index="9" draw:style-name="gr1" draw:text-style-name="P1" svg:width="16.511cm" svg:height="0.054cm"><text:p/></draw:rect></text:p>
      <text:p text:style-name="Standard" loext:marker-style-name="T1"><text:span text:style-name="T1">Beonedge Asset Allocation Framework</text:span><text:span text:style-name="T1"/></text:p>
      <text:p text:style-name="Standard">At Beonedge, capital is allocated across multiple asset classes to balance <text:span text:style-name="T1">growth, stability, and risk management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Standard" loext:marker-style-name="T1"><text:span text:style-name="T1">Asset Class</text:span><text:span text:style-name="T1"/></text:p>
            </table:table-cell>
            <table:table-cell table:style-name="Table1.A1" office:value-type="string">
              <text:p text:style-name="Standard" loext:marker-style-name="T1"><text:span text:style-name="T1">Allocation Range</text:span><text:span text:style-name="T1"/></text:p>
            </table:table-cell>
            <table:table-cell table:style-name="Table1.A1" office:value-type="string">
              <text:p text:style-name="Standard" loext:marker-style-name="T1"><text:span text:style-name="T1">Objective</text:span><text:span text:style-name="T1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Standard">Indian Equities</text:p>
          </table:table-cell>
          <table:table-cell table:style-name="Table1.A1" office:value-type="string">
            <text:p text:style-name="Standard">50–70%</text:p>
          </table:table-cell>
          <table:table-cell table:style-name="Table1.A1" office:value-type="string">
            <text:p text:style-name="Standard">Long-term capital growth</text:p>
          </table:table-cell>
        </table:table-row>
        <table:table-row table:style-name="Table1.1">
          <table:table-cell table:style-name="Table1.A1" office:value-type="string">
            <text:p text:style-name="Standard">Commodities</text:p>
          </table:table-cell>
          <table:table-cell table:style-name="Table1.A1" office:value-type="string">
            <text:p text:style-name="Standard">10–20%</text:p>
          </table:table-cell>
          <table:table-cell table:style-name="Table1.A1" office:value-type="string">
            <text:p text:style-name="Standard">Hedge against inflation and macro shocks</text:p>
          </table:table-cell>
        </table:table-row>
        <table:table-row table:style-name="Table1.1">
          <table:table-cell table:style-name="Table1.A1" office:value-type="string">
            <text:p text:style-name="Standard">Fixed Income</text:p>
          </table:table-cell>
          <table:table-cell table:style-name="Table1.A1" office:value-type="string">
            <text:p text:style-name="Standard">10–25%</text:p>
          </table:table-cell>
          <table:table-cell table:style-name="Table1.A1" office:value-type="string">
            <text:p text:style-name="Standard">Stability and capital protection</text:p>
          </table:table-cell>
        </table:table-row>
        <table:table-row table:style-name="Table1.1">
          <table:table-cell table:style-name="Table1.A1" office:value-type="string">
            <text:p text:style-name="Standard">Cash / Tactical</text:p>
          </table:table-cell>
          <table:table-cell table:style-name="Table1.A1" office:value-type="string">
            <text:p text:style-name="Standard">5–10%</text:p>
          </table:table-cell>
          <table:table-cell table:style-name="Table1.A1" office:value-type="string">
            <text:p text:style-name="Standard">Opportunities during market corrections</text:p>
          </table:table-cell>
        </table:table-row>
      </table:table>
      <text:p text:style-name="Standard"/>
      <text:p text:style-name="Standard" loext:marker-style-name="T1"><text:span text:style-name="T1">Key Principles</text:span><text:span text:style-name="T1"/></text:p>
      <text:p text:style-name="Standard">• Diversification across asset classes<text:line-break/>• Dynamic allocation based on market conditions<text:line-break/>• Focus on high-conviction investments<text:line-break/>• Risk-adjusted portfolio construction</text:p>
      <text:p text:style-name="Standard"><text:span text:style-name="T1">Asset allocation is one of the most important drivers of long-term investment returns.</text:span></text:p>
      <text:p text:style-name="Standard" loext:marker-style-name="T1"><text:soft-page-break/><text:span text:style-name="T1">Slide 6 — What We Do NOT Do</text:span><text:span text:style-name="T1"/></text:p>
      <text:p text:style-name="Standard">At Beonedge, transparency and integrity are core values.</text:p>
      <text:p text:style-name="Standard">We <text:span text:style-name="T1">do not</text:span>:</text:p>
      <text:p text:style-name="Standard">• Promise unrealistic or guaranteed returns<text:line-break/>• Offer trading tips or speculative recommendations<text:line-break/>• Claim to double or triple money<text:line-break/>• Run Telegram or signal groups<text:line-break/>• Encourage short-term speculation</text:p>
      <text:p text:style-name="Standard">Our focus remains strictly on <text:span text:style-name="T1">long-term disciplined wealth creation</text:span>.</text:p>
      <text:p text:style-name="Standard"><draw:rect text:anchor-type="as-char" style:rel-width="100%" draw:z-index="10" draw:style-name="gr1" draw:text-style-name="P1" svg:width="16.511cm" svg:height="0.054cm"><text:p/></draw:rect></text:p>
      <text:p text:style-name="Standard" loext:marker-style-name="T1"><text:span text:style-name="T1">Slide 7 — Client Investment Tracking</text:span><text:span text:style-name="T1"/></text:p>
      <text:p text:style-name="Standard">We believe investors should have <text:span text:style-name="T1">complete transparency</text:span> regarding their investments.</text:p>
      <text:p text:style-name="Standard">Beonedge has developed a <text:span text:style-name="T1">dedicated client portal</text:span> where investors can:</text:p>
      <text:p text:style-name="Standard">• Track their investments<text:line-break/>• Monitor portfolio performance<text:line-break/>• View transaction history<text:line-break/>• Stay updated on portfolio allocation</text:p>
      <text:p text:style-name="Standard">This platform is currently available for clients and will soon be expanded with a <text:span text:style-name="T1">full public website and landing page</text:span>.</text:p>
      <text:p text:style-name="Standard"><draw:rect text:anchor-type="as-char" style:rel-width="100%" draw:z-index="11" draw:style-name="gr1" draw:text-style-name="P1" svg:width="16.511cm" svg:height="0.054cm"><text:p/></draw:rect></text:p>
      <text:p text:style-name="Standard" loext:marker-style-name="T1"><text:span text:style-name="T1">Slide 8 — Contact Us</text:span><text:span text:style-name="T1"/></text:p>
      <text:p text:style-name="Standard"><text:span text:style-name="T1">Beonedge Wealth Management</text:span></text:p>
      <text:p text:style-name="Standard"><text:span text:style-name="T2">📍</text:span> Address<text:line-break/>College Road, Powarh<text:line-break/>Ghatsila – 832303</text:p>
      <text:p text:style-name="Standard"><text:soft-page-break/><text:span text:style-name="T2">📞</text:span> Phone<text:line-break/>8789136062<text:line-break/>6201907898</text:p>
      <text:p text:style-name="Standard"><text:span text:style-name="T2">🌐</text:span> Website<text:line-break/>beonedge.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ubhojit Das</meta:initial-creator>
    <meta:editing-cycles>2</meta:editing-cycles>
    <meta:creation-date>2026-03-14T17:48:00</meta:creation-date>
    <dc:date>2026-03-15T01:21:02.460961100</dc:date>
    <meta:editing-duration>PT5M40S</meta:editing-duration>
    <meta:generator>LibreOffice/26.2.0.3$Linux_X86_64 LibreOffice_project/afbbd0df0edb6d40b450b0337ac646b0913a760c</meta:generator>
    <meta:document-statistic meta:table-count="1" meta:image-count="1" meta:object-count="0" meta:page-count="7" meta:paragraph-count="101" meta:word-count="771" meta:character-count="5272" meta:non-whitespace-character-count="4588"/>
    <meta:user-defined meta:name="AppVersion">16.0000</meta:user-defined>
    <meta:template xlink:type="simple" xlink:actuate="onRequest" xlink:title="Normal.dotm" xlink:href=""/>
  </office:meta>
</office:document-meta>
</file>